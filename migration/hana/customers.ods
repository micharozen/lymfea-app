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m_sansregular" svg:font-family="Dm_sans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7FBFF" style:repeat-content="false"/>
      <style:paragraph-properties fo:text-align="center"/>
      <style:text-properties fo:color="#A1A1A1" style:font-name="Dm_sansregular" style:font-name-asian="Dm_sansregular" style:font-name-complex="Dm_sansregular" fo:font-size="9pt" style:font-size-asian="9pt" style:font-size-complex="9pt"/>
    </style:style>
    <style:style style:name="ce3" style:family="table-cell" style:parent-style-name="Default" style:data-style-name="N0">
      <style:table-cell-properties style:vertical-align="middle" fo:wrap-option="wrap" fo:background-color="#F7FBFF" style:repeat-content="false"/>
      <style:paragraph-properties fo:text-align="start" fo:margin-left="0cm"/>
      <style:text-properties fo:color="#A1A1A1" style:font-name="Dm_sansregular" style:font-name-asian="Dm_sansregular" style:font-name-complex="Dm_sansregular" fo:font-size="9pt" style:font-size-asian="9pt" style:font-size-complex="9pt"/>
    </style:style>
    <style:style style:name="ce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5" style:family="table-cell" style:parent-style-name="Lien_32_hypertexte" style:data-style-name="N0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7" style:family="table-cell" style:parent-style-name="Lien_32_hypertexte" style:data-style-name="N19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Lien_32_hypertexte" style:data-style-name="N0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666666" style:font-name="Dm_sansregular" style:font-name-asian="Dm_sansregular" style:font-name-complex="Dm_sansregular" fo:font-size="8pt" style:font-size-asian="8pt" style:font-size-complex="8pt"/>
    </style:style>
    <style:style style:name="ce11" style:family="table-cell" style:parent-style-name="Lien_32_hypertexte" style:data-style-name="N19">
      <style:table-cell-properties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30.6pt" style:use-optimal-row-height="true" fo:break-before="auto"/>
    </style:style>
    <style:style style:name="ro5" style:family="table-row">
      <style:table-row-properties style:row-height="40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odifier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Ville</text:p>
          </table:table-cell>
          <table:table-cell office:value-type="string" table:style-name="ce3">
            <text:p>Téléphone</text:p>
          </table:table-cell>
          <table:table-cell office:value-type="string" table:style-name="ce3">
            <text:p>Téléphone fixe#</text:p>
          </table:table-cell>
          <table:table-cell office:value-type="string" table:style-name="ce3">
            <text:p>Mobile#</text:p>
          </table:table-cell>
          <table:table-cell office:value-type="string" table:style-name="ce2">
            <text:p>PMS</text:p>
          </table:table-cell>
          <table:table-cell office:value-type="string" table:style-name="ce2">
            <text:p>Transactions</text:p>
          </table:table-cell>
          <table:table-cell office:value-type="string" table:style-name="ce2">
            <text:p>Rendez-vous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aoven Ricoeur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3T00:00:00" table:style-name="ce7">
            <text:p><text:a xlink:href="https://eu.spa.pxier.com/fr/contract.aspx?id=5389&amp;cid=8449">03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 Nicolas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0747368" table:style-name="ce6">
            <text:p>61074736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8T00:00:00" table:style-name="ce7">
            <text:p><text:a xlink:href="https://eu.spa.pxier.com/fr/contract.aspx?id=5414&amp;cid=8471">18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uliette Gente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46625720" table:style-name="ce6">
            <text:p>3364662572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25T00:00:00" table:style-name="ce7">
            <text:p><text:a xlink:href="https://eu.spa.pxier.com/fr/contract.aspx?id=5410&amp;cid=8468">25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lejandro Cialo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30T00:00:00" table:style-name="ce7">
            <text:p><text:a xlink:href="https://eu.spa.pxier.com/fr/contract.aspx?id=5404&amp;cid=8463">30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Vova Volinetts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30T00:00:00" table:style-name="ce7">
            <text:p><text:a xlink:href="https://eu.spa.pxier.com/fr/contract.aspx?id=5403&amp;cid=8462">30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lement Aigreaul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0T00:00:00" table:style-name="ce7">
            <text:p><text:a xlink:href="https://eu.spa.pxier.com/fr/contract.aspx?id=5402&amp;cid=8461">20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Dawel Yang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3T00:00:00" table:style-name="ce7">
            <text:p><text:a xlink:href="https://eu.spa.pxier.com/fr/contract.aspx?id=5401&amp;cid=8460">03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me Sophie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4T00:00:00" table:style-name="ce7">
            <text:p><text:a xlink:href="https://eu.spa.pxier.com/fr/contract.aspx?id=5399&amp;cid=8458">24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Tatiana De Nicolay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3T00:00:00" table:style-name="ce7">
            <text:p><text:a xlink:href="https://eu.spa.pxier.com/fr/contract.aspx?id=5397&amp;cid=8456">03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me Agnes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85928023" table:style-name="ce6">
            <text:p>78592802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8T00:00:00" table:style-name="ce7">
            <text:p><text:a xlink:href="https://eu.spa.pxier.com/fr/contract.aspx?id=5394&amp;cid=8454">18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Eric Jaoul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7T00:00:00" table:style-name="ce7">
            <text:p><text:a xlink:href="https://eu.spa.pxier.com/fr/contract.aspx?id=5392&amp;cid=8452">07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gathe Fourque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9T00:00:00" table:style-name="ce7">
            <text:p><text:a xlink:href="https://eu.spa.pxier.com/fr/contract.aspx?id=5418&amp;cid=8474">19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Elodie Heusto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7T00:00:00" table:style-name="ce7">
            <text:p><text:a xlink:href="https://eu.spa.pxier.com/fr/contract.aspx?id=5375&amp;cid=8438">17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RIM MEHDJAHED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05150398" table:style-name="ce6">
            <text:p>60515039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6T00:00:00" table:style-name="ce7">
            <text:p><text:a xlink:href="https://eu.spa.pxier.com/fr/contract.aspx?id=5373&amp;cid=8437">16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rie Sequeira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40136441" table:style-name="ce6">
            <text:p>64013644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9T00:00:00" table:style-name="ce7">
            <text:p><text:a xlink:href="https://eu.spa.pxier.com/fr/contract.aspx?id=5468&amp;cid=8435">29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 Berriche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81170158" table:style-name="ce6">
            <text:p>78117015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1T00:00:00" table:style-name="ce7">
            <text:p><text:a xlink:href="https://eu.spa.pxier.com/fr/contract.aspx?id=5371&amp;cid=8434">21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Sandra Gomes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7T00:00:00" table:style-name="ce7">
            <text:p><text:a xlink:href="https://eu.spa.pxier.com/fr/contract.aspx?id=5366&amp;cid=8430">2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Kim Braeckma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2477436969" table:style-name="ce6">
            <text:p>3247743696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9T00:00:00" table:style-name="ce7">
            <text:p><text:a xlink:href="https://eu.spa.pxier.com/fr/contract.aspx?id=5365&amp;cid=8429">19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Victoire Le Goaëc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82018452" table:style-name="ce6">
            <text:p>682018452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2T00:00:00" table:style-name="ce7">
            <text:p><text:a xlink:href="https://eu.spa.pxier.com/fr/contract.aspx?id=5364&amp;cid=8428">02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ntoine Castets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99226982" table:style-name="ce6">
            <text:p>699226982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4T00:00:00" table:style-name="ce7">
            <text:p><text:a xlink:href="https://eu.spa.pxier.com/fr/contract.aspx?id=5357&amp;cid=8423">1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aura .Shovli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447969662131" table:style-name="ce6">
            <text:p>4,4797E+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22T00:00:00" table:style-name="ce7">
            <text:p><text:a xlink:href="https://eu.spa.pxier.com/fr/contract.aspx?id=5349&amp;cid=8421">22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naïs Dussar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85114936" table:style-name="ce6">
            <text:p>685114936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7T00:00:00" table:style-name="ce7">
            <text:p><text:a xlink:href="https://eu.spa.pxier.com/fr/contract.aspx?id=5345&amp;cid=8417">17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hloe Le Ferrand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89612908" table:style-name="ce6">
            <text:p>78961290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7T00:00:00" table:style-name="ce7">
            <text:p><text:a xlink:href="https://eu.spa.pxier.com/fr/contract.aspx?id=5478&amp;cid=8516">27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aud Auzat-Bonassi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80549063" table:style-name="ce6">
            <text:p>68054906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1T00:00:00" table:style-name="ce7">
            <text:p><text:a xlink:href="https://eu.spa.pxier.com/fr/contract.aspx?id=5518&amp;cid=8544">01/07/2026</text:a>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string" table:style-name="ce6">
            <text:p>Sophie Laveissiere Corvo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23102480" table:style-name="ce6">
            <text:p>62310248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8-07T00:00:00" table:style-name="ce7">
            <text:p><text:a xlink:href="https://eu.spa.pxier.com/fr/contract.aspx?id=5514&amp;cid=8540">07/08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Sara Lee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6508633320" table:style-name="ce6">
            <text:p>1650863332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1T00:00:00" table:style-name="ce7">
            <text:p><text:a xlink:href="https://eu.spa.pxier.com/fr/contract.aspx?id=5511&amp;cid=8537">01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rgaux Vairo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77227102" table:style-name="ce6">
            <text:p>677227102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12T00:00:00" table:style-name="ce7">
            <text:p><text:a xlink:href="https://eu.spa.pxier.com/fr/contract.aspx?id=5505&amp;cid=8535">12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Elena Fei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16T00:00:00" table:style-name="ce7">
            <text:p><text:a xlink:href="https://eu.spa.pxier.com/fr/contract.aspx?id=5504&amp;cid=8534">16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elanie Sulta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34356038" table:style-name="ce6">
            <text:p>63435603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8T00:00:00" table:style-name="ce7">
            <text:p><text:a xlink:href="https://eu.spa.pxier.com/fr/contract.aspx?id=5498&amp;cid=8530">28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ude Carrier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76771061" table:style-name="ce6">
            <text:p>67677106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4T00:00:00" table:style-name="ce7">
            <text:p><text:a xlink:href="https://eu.spa.pxier.com/fr/contract.aspx?id=5495&amp;cid=8527">04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Sarai FISZEL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4461147" table:style-name="ce6">
            <text:p>614461147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9T00:00:00" table:style-name="ce7">
            <text:p><text:a xlink:href="https://eu.spa.pxier.com/fr/contract.aspx?id=5488&amp;cid=8524">29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lexandra Bresso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2T00:00:00" table:style-name="ce7">
            <text:p><text:a xlink:href="https://eu.spa.pxier.com/fr/contract.aspx?id=5486&amp;cid=8523">02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s Choe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4153095479" table:style-name="ce6">
            <text:p>1415309547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6T00:00:00" table:style-name="ce7">
            <text:p><text:a xlink:href="https://eu.spa.pxier.com/fr/contract.aspx?id=5487&amp;cid=8522">26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rie S'infiltre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4T00:00:00" table:style-name="ce7">
            <text:p><text:a xlink:href="https://eu.spa.pxier.com/fr/contract.aspx?id=5358&amp;cid=8424">1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Thomas Poule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9T00:00:00" table:style-name="ce7">
            <text:p><text:a xlink:href="https://eu.spa.pxier.com/fr/contract.aspx?id=5469&amp;cid=8510">29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xime Bos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65556784" table:style-name="ce6">
            <text:p>665556784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7T00:00:00" table:style-name="ce7">
            <text:p><text:a xlink:href="https://eu.spa.pxier.com/fr/contract.aspx?id=5463&amp;cid=8506">2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ames Kennedy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3106995469" table:style-name="ce6">
            <text:p>1310699546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4T00:00:00" table:style-name="ce7">
            <text:p><text:a xlink:href="https://eu.spa.pxier.com/fr/contract.aspx?id=5458&amp;cid=8502">2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Eleona Kalesha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32364613" table:style-name="ce6">
            <text:p>63236461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7T00:00:00" table:style-name="ce7">
            <text:p><text:a xlink:href="https://eu.spa.pxier.com/fr/contract.aspx?id=5446&amp;cid=8495">07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Elisabeth Say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17T00:00:00" table:style-name="ce7">
            <text:p><text:a xlink:href="https://eu.spa.pxier.com/fr/contract.aspx?id=5439&amp;cid=8491">17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. Pace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93357840074" table:style-name="ce6">
            <text:p>3,93358E+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1T00:00:00" table:style-name="ce7">
            <text:p><text:a xlink:href="https://eu.spa.pxier.com/fr/contract.aspx?id=5438&amp;cid=8490">21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Clément Yam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64484623" table:style-name="ce6">
            <text:p>76448462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7T00:00:00" table:style-name="ce7">
            <text:p><text:a xlink:href="https://eu.spa.pxier.com/fr/contract.aspx?id=5428&amp;cid=8483">2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. PETKEVICH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17812495970" table:style-name="ce6">
            <text:p>1781249597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2T00:00:00" table:style-name="ce7">
            <text:p><text:a xlink:href="https://eu.spa.pxier.com/fr/contract.aspx?id=5423&amp;cid=8479">22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Patricia Sebbag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1T00:00:00" table:style-name="ce7">
            <text:p><text:a xlink:href="https://eu.spa.pxier.com/fr/contract.aspx?id=5421&amp;cid=8477">21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urelia Hermange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7-07T00:00:00" table:style-name="ce7">
            <text:p><text:a xlink:href="https://eu.spa.pxier.com/fr/contract.aspx?id=5420&amp;cid=8476">07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aurence Ferra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2T00:00:00" table:style-name="ce7">
            <text:p><text:a xlink:href="https://eu.spa.pxier.com/fr/contract.aspx?id=5163&amp;cid=8262">12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Clara Ddouilhe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40955369" table:style-name="ce6">
            <text:p>3364095536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5T00:00:00" table:style-name="ce7">
            <text:p><text:a xlink:href="https://eu.spa.pxier.com/fr/contract.aspx?id=5272&amp;cid=8363">05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Valentine Bourso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49625157" table:style-name="ce6">
            <text:p>649625157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7T00:00:00" table:style-name="ce7">
            <text:p><text:a xlink:href="https://eu.spa.pxier.com/fr/contract.aspx?id=5266&amp;cid=8358">0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aura Bargai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79220473" table:style-name="ce6">
            <text:p>67922047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4T00:00:00" table:style-name="ce7">
            <text:p><text:a xlink:href="https://eu.spa.pxier.com/fr/contract.aspx?id=5252&amp;cid=8348">1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Clara Kong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02T00:00:00" table:style-name="ce7">
            <text:p><text:a xlink:href="https://eu.spa.pxier.com/fr/contract.aspx?id=5233&amp;cid=8336">02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Jean Laurent Rouviere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3T00:00:00" table:style-name="ce7">
            <text:p><text:a xlink:href="https://eu.spa.pxier.com/fr/contract.aspx?id=5218&amp;cid=8322">13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Sandra Hirth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1T00:00:00" table:style-name="ce7">
            <text:p><text:a xlink:href="https://eu.spa.pxier.com/fr/contract.aspx?id=5209&amp;cid=8314">11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aure Dary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6T00:00:00" table:style-name="ce7">
            <text:p><text:a xlink:href="https://eu.spa.pxier.com/fr/contract.aspx?id=5442&amp;cid=5860">26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Caroline Martin-Bouyer</text:p>
          </table:table-cell>
          <table:table-cell office:value-type="string" table:number-columns-spanned="1" table:number-rows-spanned="2" table:style-name="ce9">
            <text:p>France</text:p>
          </table:table-cell>
          <table:table-cell table:number-columns-spanned="1" table:number-rows-spanned="2" table:style-name="ce9"/>
          <table:table-cell table:number-columns-spanned="1" table:number-rows-spanned="2" table:style-name="ce9"/>
          <table:table-cell office:value-type="float" office:value="620566325" table:number-columns-spanned="1" table:number-rows-spanned="2" table:style-name="ce9">
            <text:p>620566325</text:p>
          </table:table-cell>
          <table:table-cell table:number-columns-spanned="1" table:number-rows-spanned="2" table:style-name="ce10"/>
          <table:table-cell office:value-type="string" table:number-columns-spanned="1" table:number-rows-spanned="2" table:style-name="ce10">
            <text:p>-</text:p>
          </table:table-cell>
          <table:table-cell office:value-type="date" office:date-value="2026-06-21T00:00:00" table:style-name="ce7">
            <text:p><text:a xlink:href="https://eu.spa.pxier.com/fr/contract.aspx?id=5175&amp;cid=8292">21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07T00:00:00" table:style-name="ce7">
            <text:p><text:a xlink:href="https://eu.spa.pxier.com/fr/contract.aspx?id=5273&amp;cid=8292">0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orena Vergani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3T00:00:00" table:style-name="ce7">
            <text:p><text:a xlink:href="https://eu.spa.pxier.com/fr/contract.aspx?id=5433&amp;cid=8291">23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Réjane Floch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1148326" table:style-name="ce6">
            <text:p>611148326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4T00:00:00" table:style-name="ce7">
            <text:p><text:a xlink:href="https://eu.spa.pxier.com/fr/contract.aspx?id=5264&amp;cid=8357">04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Matthieu Mulhaup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0765678" table:style-name="ce6">
            <text:p>610765678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5T00:00:00" table:style-name="ce7">
            <text:p><text:a xlink:href="https://eu.spa.pxier.com/fr/contract.aspx?id=5039&amp;cid=8189">05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Jeane Carmichael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12-05T00:00:00" table:style-name="ce7">
            <text:p><text:a xlink:href="https://eu.spa.pxier.com/fr/contract.aspx?id=4986&amp;cid=8147">05/12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Sandra Rouard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03192375" table:style-name="ce6">
            <text:p>603192375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6T00:00:00" table:style-name="ce7">
            <text:p><text:a xlink:href="https://eu.spa.pxier.com/fr/contract.aspx?id=4959&amp;cid=8126">06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Perrine Daumont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03431686" table:style-name="ce6">
            <text:p>603431686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9T00:00:00" table:style-name="ce7">
            <text:p><text:a xlink:href="https://eu.spa.pxier.com/fr/contract.aspx?id=4516&amp;cid=7817">19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3" table:style-name="ce8"/>
          <table:table-cell office:value-type="string" table:number-columns-spanned="1" table:number-rows-spanned="3" table:style-name="ce9">
            <text:p>Juliette Berthu</text:p>
          </table:table-cell>
          <table:table-cell office:value-type="string" table:number-columns-spanned="1" table:number-rows-spanned="3" table:style-name="ce9">
            <text:p>France</text:p>
          </table:table-cell>
          <table:table-cell table:number-columns-spanned="1" table:number-rows-spanned="3" table:style-name="ce9"/>
          <table:table-cell table:number-columns-spanned="1" table:number-rows-spanned="3" table:style-name="ce9"/>
          <table:table-cell office:value-type="float" office:value="683364282" table:number-columns-spanned="1" table:number-rows-spanned="3" table:style-name="ce9">
            <text:p>683364282</text:p>
          </table:table-cell>
          <table:table-cell table:number-columns-spanned="1" table:number-rows-spanned="3" table:style-name="ce10"/>
          <table:table-cell office:value-type="date" office:date-value="2026-04-13T00:00:00" table:style-name="ce7">
            <text:p><text:a xlink:href="https://eu.spa.pxier.com/fr/spatrans.aspx?id=2396&amp;cid=7617">13/04/2026</text:a></text:p>
          </table:table-cell>
          <table:table-cell office:value-type="date" office:date-value="2026-06-21T00:00:00" table:number-columns-spanned="1" table:number-rows-spanned="3" table:style-name="ce11">
            <text:p><text:a xlink:href="https://eu.spa.pxier.com/fr/contract.aspx?id=5432&amp;cid=7617">21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3-13T00:00:00" table:style-name="ce7">
            <text:p><text:a xlink:href="https://eu.spa.pxier.com/fr/spatrans.aspx?id=2121&amp;cid=7617">13/03/2026</text:a></text:p>
          </table:table-cell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3-13T00:00:00" table:style-name="ce7">
            <text:p><text:a xlink:href="https://eu.spa.pxier.com/fr/spatrans.aspx?id=2118&amp;cid=7617">13/03/2026</text:a></text:p>
          </table:table-cell>
          <table:covered-table-cell/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Fanny Morel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48774059" table:style-name="ce6">
            <text:p>33648774059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4T00:00:00" table:style-name="ce7">
            <text:p><text:a xlink:href="https://eu.spa.pxier.com/fr/contract.aspx?id=5033&amp;cid=7545">0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orena Vergani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29264365" table:style-name="ce6">
            <text:p>629264365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5T00:00:00" table:style-name="ce7">
            <text:p><text:a xlink:href="https://eu.spa.pxier.com/fr/contract.aspx?id=5470&amp;cid=6948">25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aetitia de Louis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date" office:date-value="2025-11-24T00:00:00" table:style-name="ce7">
            <text:p><text:a xlink:href="https://eu.spa.pxier.com/fr/spatrans.aspx?id=1269&amp;cid=6363">24/11/2025</text:a></text:p>
          </table:table-cell>
          <table:table-cell office:value-type="date" office:date-value="2026-06-10T00:00:00" table:style-name="ce7">
            <text:p><text:a xlink:href="https://eu.spa.pxier.com/fr/contract.aspx?id=5311&amp;cid=6363">10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Amélie Lee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16457390" table:style-name="ce6">
            <text:p>3361645739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7-06T00:00:00" table:style-name="ce7">
            <text:p><text:a xlink:href="https://eu.spa.pxier.com/fr/contract.aspx?id=5465&amp;cid=5951">06/07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Kostia Homain Debain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1T00:00:00" table:style-name="ce7">
            <text:p><text:a xlink:href="https://eu.spa.pxier.com/fr/contract.aspx?id=5328&amp;cid=8405">21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s Tia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861386189066" table:style-name="ce6">
            <text:p>8,61386E+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2T00:00:00" table:style-name="ce7">
            <text:p><text:a xlink:href="https://eu.spa.pxier.com/fr/contract.aspx?id=5340&amp;cid=8413">12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 Sterling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2T00:00:00" table:style-name="ce7">
            <text:p><text:a xlink:href="https://eu.spa.pxier.com/fr/contract.aspx?id=5338&amp;cid=8411">12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nne Helene Buchberger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89463971" table:style-name="ce6">
            <text:p>78946397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12T00:00:00" table:style-name="ce7">
            <text:p><text:a xlink:href="https://eu.spa.pxier.com/fr/contract.aspx?id=5337&amp;cid=8410">12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Sebastien Rober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30T00:00:00" table:style-name="ce7">
            <text:p><text:a xlink:href="https://eu.spa.pxier.com/fr/contract.aspx?id=5336&amp;cid=8409">30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onstance de Saint Exupery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0T00:00:00" table:style-name="ce7">
            <text:p><text:a xlink:href="https://eu.spa.pxier.com/fr/contract.aspx?id=5333&amp;cid=8408">20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rine Drunet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28T00:00:00" table:style-name="ce7">
            <text:p><text:a xlink:href="https://eu.spa.pxier.com/fr/contract.aspx?id=5330&amp;cid=8406">28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ustine Feutry</text:p>
          </table:table-cell>
          <table:table-cell office:value-type="string" table:style-name="ce6">
            <text:p>France</text:p>
          </table:table-cell>
          <table:table-cell table:number-columns-repeated="3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9T00:00:00" table:style-name="ce7">
            <text:p><text:a xlink:href="https://eu.spa.pxier.com/fr/contract.aspx?id=5327&amp;cid=8404">19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Lila Bocquenti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781515442" table:style-name="ce6">
            <text:p>33781515442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9T00:00:00" table:style-name="ce7">
            <text:p><text:a xlink:href="https://eu.spa.pxier.com/fr/contract.aspx?id=5308&amp;cid=8390">09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Jana Masmoudi Pavanello</text:p>
          </table:table-cell>
          <table:table-cell office:value-type="string" table:number-columns-spanned="1" table:number-rows-spanned="2" table:style-name="ce9">
            <text:p>France</text:p>
          </table:table-cell>
          <table:table-cell table:number-columns-spanned="1" table:number-rows-spanned="2" table:style-name="ce9"/>
          <table:table-cell table:number-columns-spanned="1" table:number-rows-spanned="2" table:style-name="ce9"/>
          <table:table-cell table:number-columns-spanned="1" table:number-rows-spanned="2" table:style-name="ce9"/>
          <table:table-cell table:number-columns-spanned="1" table:number-rows-spanned="2" table:style-name="ce10"/>
          <table:table-cell office:value-type="string" table:number-columns-spanned="1" table:number-rows-spanned="2" table:style-name="ce10">
            <text:p>-</text:p>
          </table:table-cell>
          <table:table-cell office:value-type="date" office:date-value="2026-06-28T00:00:00" table:style-name="ce7">
            <text:p><text:a xlink:href="https://eu.spa.pxier.com/fr/contract.aspx?id=5444&amp;cid=8386">28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23T00:00:00" table:style-name="ce7">
            <text:p><text:a xlink:href="https://eu.spa.pxier.com/fr/contract.aspx?id=5434&amp;cid=8386">23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Davina Delouis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33625343460" table:style-name="ce6">
            <text:p>33625343460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7T00:00:00" table:style-name="ce7">
            <text:p><text:a xlink:href="https://eu.spa.pxier.com/fr/contract.aspx?id=5295&amp;cid=8380">07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Kheira Ayoun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781969594" table:style-name="ce6">
            <text:p>781969594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5T00:00:00" table:style-name="ce7">
            <text:p><text:a xlink:href="https://eu.spa.pxier.com/fr/contract.aspx?id=5279&amp;cid=8369">05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Jeremy Giacopazzi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11105833" table:style-name="ce6">
            <text:p>611105833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6T00:00:00" table:style-name="ce7">
            <text:p><text:a xlink:href="https://eu.spa.pxier.com/fr/contract.aspx?id=5280&amp;cid=8370">06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Daphne JOVANOVIC</text:p>
          </table:table-cell>
          <table:table-cell office:value-type="string" table:number-columns-spanned="1" table:number-rows-spanned="2" table:style-name="ce9">
            <text:p>France</text:p>
          </table:table-cell>
          <table:table-cell table:number-columns-spanned="1" table:number-rows-spanned="2" table:style-name="ce9"/>
          <table:table-cell table:number-columns-spanned="1" table:number-rows-spanned="2" table:style-name="ce9"/>
          <table:table-cell office:value-type="float" office:value="19177033005" table:number-columns-spanned="1" table:number-rows-spanned="2" table:style-name="ce9">
            <text:p>19177033005</text:p>
          </table:table-cell>
          <table:table-cell table:number-columns-spanned="1" table:number-rows-spanned="2" table:style-name="ce10"/>
          <table:table-cell office:value-type="string" table:number-columns-spanned="1" table:number-rows-spanned="2" table:style-name="ce10">
            <text:p>-</text:p>
          </table:table-cell>
          <table:table-cell office:value-type="date" office:date-value="2026-06-29T00:00:00" table:style-name="ce7">
            <text:p><text:a xlink:href="https://eu.spa.pxier.com/fr/contract.aspx?id=5284&amp;cid=8373">29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28T00:00:00" table:style-name="ce7">
            <text:p><text:a xlink:href="https://eu.spa.pxier.com/fr/contract.aspx?id=5283&amp;cid=8373">28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lexandra Hervey</text:p>
          </table:table-cell>
          <table:table-cell office:value-type="string" table:style-name="ce6">
            <text:p>France</text:p>
          </table:table-cell>
          <table:table-cell table:number-columns-repeated="2" table:style-name="ce6"/>
          <table:table-cell office:value-type="float" office:value="652690811" table:style-name="ce6">
            <text:p>652690811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07T00:00:00" table:style-name="ce7">
            <text:p><text:a xlink:href="https://eu.spa.pxier.com/fr/contract.aspx?id=5286&amp;cid=8374">07/06/2026</text:a>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6">
            <text:p>Philippe CASSAN</text:p>
          </table:table-cell>
          <table:table-cell office:value-type="string" table:style-name="ce6">
            <text:p>SAINT ORENS DE GAMEVILLE, France</text:p>
          </table:table-cell>
          <table:table-cell office:value-type="float" office:value="33650902294" table:style-name="ce6">
            <text:p>33650902294</text:p>
          </table:table-cell>
          <table:table-cell table:style-name="ce6"/>
          <table:table-cell office:value-type="float" office:value="33650902294" table:style-name="ce6">
            <text:p>33650902294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date" office:date-value="2026-06-29T00:00:00" table:style-name="ce7">
            <text:p><text:a xlink:href="https://eu.spa.pxier.com/fr/contract.aspx?id=5460&amp;cid=8503">29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3" table:style-name="ce8"/>
          <table:table-cell office:value-type="string" table:number-columns-spanned="1" table:number-rows-spanned="3" table:style-name="ce9">
            <text:p>Garamond Elodie</text:p>
          </table:table-cell>
          <table:table-cell office:value-type="string" table:number-columns-spanned="1" table:number-rows-spanned="3" table:style-name="ce9">
            <text:p>France</text:p>
          </table:table-cell>
          <table:table-cell office:value-type="float" office:value="0" table:number-columns-spanned="1" table:number-rows-spanned="3" table:style-name="ce9">
            <text:p>0</text:p>
          </table:table-cell>
          <table:table-cell table:number-columns-spanned="1" table:number-rows-spanned="3" table:style-name="ce9"/>
          <table:table-cell office:value-type="float" office:value="685109165" table:number-columns-spanned="1" table:number-rows-spanned="3" table:style-name="ce9">
            <text:p>685109165</text:p>
          </table:table-cell>
          <table:table-cell table:number-columns-spanned="1" table:number-rows-spanned="3" table:style-name="ce10"/>
          <table:table-cell office:value-type="string" table:number-columns-spanned="1" table:number-rows-spanned="3" table:style-name="ce10">
            <text:p>-</text:p>
          </table:table-cell>
          <table:table-cell office:value-type="date" office:date-value="2026-06-30T00:00:00" table:style-name="ce7">
            <text:p><text:a xlink:href="https://eu.spa.pxier.com/fr/contract.aspx?id=5126&amp;cid=811">30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23T00:00:00" table:style-name="ce7">
            <text:p><text:a xlink:href="https://eu.spa.pxier.com/fr/contract.aspx?id=5448&amp;cid=811">23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16T00:00:00" table:style-name="ce7">
            <text:p><text:a xlink:href="https://eu.spa.pxier.com/fr/contract.aspx?id=5124&amp;cid=811">16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aïmouna Diop</text:p>
          </table:table-cell>
          <table:table-cell office:value-type="string" table:style-name="ce6">
            <text:p>Paris, France</text:p>
          </table:table-cell>
          <table:table-cell office:value-type="float" office:value="602602275" table:style-name="ce6">
            <text:p>602602275</text:p>
          </table:table-cell>
          <table:table-cell table:number-columns-repeated="2" table:style-name="ce6"/>
          <table:table-cell table:style-name="ce4"/>
          <table:table-cell office:value-type="date" office:date-value="2026-06-21T00:00:00" table:style-name="ce7">
            <text:p><text:a xlink:href="https://eu.spa.pxier.com/fr/spatrans.aspx?id=2494&amp;cid=8492">21/06/2026</text:a></text:p>
          </table:table-cell>
          <table:table-cell office:value-type="date" office:date-value="2026-06-28T00:00:00" table:style-name="ce7">
            <text:p><text:a xlink:href="https://eu.spa.pxier.com/fr/contract.aspx?id=5440&amp;cid=8492">28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Vincent Delnevo</text:p>
          </table:table-cell>
          <table:table-cell office:value-type="string" table:number-columns-spanned="1" table:number-rows-spanned="2" table:style-name="ce9">
            <text:p>Pontoise, France</text:p>
          </table:table-cell>
          <table:table-cell office:value-type="float" office:value="607945464" table:number-columns-spanned="1" table:number-rows-spanned="2" table:style-name="ce9">
            <text:p>607945464</text:p>
          </table:table-cell>
          <table:table-cell table:number-columns-spanned="1" table:number-rows-spanned="2" table:style-name="ce9"/>
          <table:table-cell office:value-type="float" office:value="607945464" table:number-columns-spanned="1" table:number-rows-spanned="2" table:style-name="ce9">
            <text:p>607945464</text:p>
          </table:table-cell>
          <table:table-cell table:number-columns-spanned="1" table:number-rows-spanned="2" table:style-name="ce10"/>
          <table:table-cell office:value-type="date" office:date-value="2026-06-20T00:00:00" table:style-name="ce7">
            <text:p><text:a xlink:href="https://eu.spa.pxier.com/fr/spatrans.aspx?id=2492&amp;cid=4362">20/06/2026</text:a></text:p>
          </table:table-cell>
          <table:table-cell office:value-type="date" office:date-value="2026-07-16T00:00:00" table:number-columns-spanned="1" table:number-rows-spanned="2" table:style-name="ce11">
            <text:p><text:a xlink:href="https://eu.spa.pxier.com/fr/contract.aspx?id=5430&amp;cid=4362">16/07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5-04-22T00:00:00" table:style-name="ce7">
            <text:p><text:a xlink:href="https://eu.spa.pxier.com/fr/spatrans.aspx?id=194&amp;cid=4362">22/04/2025</text:a></text:p>
          </table:table-cell>
          <table:covered-table-cell/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Clarisse Pean</text:p>
          </table:table-cell>
          <table:table-cell office:value-type="string" table:number-columns-spanned="1" table:number-rows-spanned="2" table:style-name="ce9">
            <text:p>Les Lilas, France</text:p>
          </table:table-cell>
          <table:table-cell office:value-type="float" office:value="623142660" table:number-columns-spanned="1" table:number-rows-spanned="2" table:style-name="ce9">
            <text:p>623142660</text:p>
          </table:table-cell>
          <table:table-cell table:number-columns-spanned="1" table:number-rows-spanned="2" table:style-name="ce9"/>
          <table:table-cell office:value-type="float" office:value="623141660" table:number-columns-spanned="1" table:number-rows-spanned="2" table:style-name="ce9">
            <text:p>623141660</text:p>
          </table:table-cell>
          <table:table-cell table:number-columns-spanned="1" table:number-rows-spanned="2" table:style-name="ce10"/>
          <table:table-cell office:value-type="date" office:date-value="2026-06-11T00:00:00" table:style-name="ce7">
            <text:p><text:a xlink:href="https://eu.spa.pxier.com/fr/spatrans.aspx?id=2479&amp;cid=6928">11/06/2026</text:a></text:p>
          </table:table-cell>
          <table:table-cell office:value-type="date" office:date-value="2026-06-11T00:00:00" table:number-columns-spanned="1" table:number-rows-spanned="2" table:style-name="ce11">
            <text:p><text:a xlink:href="https://eu.spa.pxier.com/fr/contract.aspx?id=5331&amp;cid=6928">11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1-14T00:00:00" table:style-name="ce7">
            <text:p><text:a xlink:href="https://eu.spa.pxier.com/fr/spatrans.aspx?id=1547&amp;cid=6928">14/01/2026</text:a></text:p>
          </table:table-cell>
          <table:covered-table-cell/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arole Chassaing</text:p>
          </table:table-cell>
          <table:table-cell office:value-type="string" table:style-name="ce6">
            <text:p>paris, France</text:p>
          </table:table-cell>
          <table:table-cell office:value-type="float" office:value="624031316" table:style-name="ce6">
            <text:p>624031316</text:p>
          </table:table-cell>
          <table:table-cell table:number-columns-repeated="2" table:style-name="ce6"/>
          <table:table-cell table:style-name="ce4"/>
          <table:table-cell office:value-type="date" office:date-value="2026-06-04T00:00:00" table:style-name="ce7">
            <text:p><text:a xlink:href="https://eu.spa.pxier.com/fr/spatrans.aspx?id=2474&amp;cid=8365">04/06/2026</text:a></text:p>
          </table:table-cell>
          <table:table-cell office:value-type="date" office:date-value="2026-07-03T00:00:00" table:style-name="ce7">
            <text:p><text:a xlink:href="https://eu.spa.pxier.com/fr/contract.aspx?id=5276&amp;cid=8365">03/07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ulie David</text:p>
          </table:table-cell>
          <table:table-cell office:value-type="string" table:style-name="ce6">
            <text:p>Le Pecq, France</text:p>
          </table:table-cell>
          <table:table-cell office:value-type="float" office:value="633471979" table:style-name="ce6">
            <text:p>633471979</text:p>
          </table:table-cell>
          <table:table-cell table:number-columns-repeated="2" table:style-name="ce6"/>
          <table:table-cell table:style-name="ce4"/>
          <table:table-cell office:value-type="date" office:date-value="2026-06-20T00:00:00" table:style-name="ce7">
            <text:p><text:a xlink:href="https://eu.spa.pxier.com/fr/spatrans.aspx?id=2493&amp;cid=8485">20/06/2026</text:a></text:p>
          </table:table-cell>
          <table:table-cell office:value-type="date" office:date-value="2026-06-23T00:00:00" table:style-name="ce7">
            <text:p><text:a xlink:href="https://eu.spa.pxier.com/fr/contract.aspx?id=5431&amp;cid=8485">23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Sonia Ohanessian</text:p>
          </table:table-cell>
          <table:table-cell office:value-type="string" table:style-name="ce6">
            <text:p>Paris, France</text:p>
          </table:table-cell>
          <table:table-cell office:value-type="float" office:value="660570109" table:style-name="ce6">
            <text:p>660570109</text:p>
          </table:table-cell>
          <table:table-cell table:number-columns-repeated="2" table:style-name="ce6"/>
          <table:table-cell table:style-name="ce4"/>
          <table:table-cell office:value-type="date" office:date-value="2025-12-16T00:00:00" table:style-name="ce7">
            <text:p><text:a xlink:href="https://eu.spa.pxier.com/fr/spatrans.aspx?id=1345&amp;cid=6577">16/12/2025</text:a></text:p>
          </table:table-cell>
          <table:table-cell office:value-type="date" office:date-value="2026-06-29T00:00:00" table:style-name="ce7">
            <text:p><text:a xlink:href="https://eu.spa.pxier.com/fr/contract.aspx?id=5493&amp;cid=6577">29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drien Saguet-Millerand</text:p>
          </table:table-cell>
          <table:table-cell office:value-type="string" table:style-name="ce6">
            <text:p>Paris, France</text:p>
          </table:table-cell>
          <table:table-cell office:value-type="float" office:value="673444333" table:style-name="ce6">
            <text:p>673444333</text:p>
          </table:table-cell>
          <table:table-cell table:number-columns-repeated="2" table:style-name="ce6"/>
          <table:table-cell table:style-name="ce4"/>
          <table:table-cell office:value-type="date" office:date-value="2026-06-25T00:00:00" table:style-name="ce7">
            <text:p><text:a xlink:href="https://eu.spa.pxier.com/fr/spatrans.aspx?id=2496&amp;cid=8513">25/06/2026</text:a></text:p>
          </table:table-cell>
          <table:table-cell office:value-type="date" office:date-value="2026-06-27T00:00:00" table:style-name="ce7">
            <text:p><text:a xlink:href="https://eu.spa.pxier.com/fr/contract.aspx?id=5473&amp;cid=8513">27/06/2026</text:a>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6">
            <text:p>CHARLOTTE BARTHELOT DE BELLEFONDS</text:p>
          </table:table-cell>
          <table:table-cell office:value-type="string" table:style-name="ce6">
            <text:p>Préfailles, France</text:p>
          </table:table-cell>
          <table:table-cell office:value-type="float" office:value="680593214" table:style-name="ce6">
            <text:p>680593214</text:p>
          </table:table-cell>
          <table:table-cell table:number-columns-repeated="2" table:style-name="ce6"/>
          <table:table-cell table:style-name="ce4"/>
          <table:table-cell office:value-type="date" office:date-value="2026-06-17T00:00:00" table:style-name="ce7">
            <text:p><text:a xlink:href="https://eu.spa.pxier.com/fr/spatrans.aspx?id=2489&amp;cid=8447">17/06/2026</text:a></text:p>
          </table:table-cell>
          <table:table-cell office:value-type="date" office:date-value="2026-06-24T00:00:00" table:style-name="ce7">
            <text:p><text:a xlink:href="https://eu.spa.pxier.com/fr/contract.aspx?id=5386&amp;cid=8447">24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Julie OLLIVIER</text:p>
          </table:table-cell>
          <table:table-cell office:value-type="string" table:style-name="ce6">
            <text:p>Paris, France</text:p>
          </table:table-cell>
          <table:table-cell office:value-type="float" office:value="685882045" table:style-name="ce6">
            <text:p>685882045</text:p>
          </table:table-cell>
          <table:table-cell table:number-columns-repeated="2" table:style-name="ce6"/>
          <table:table-cell table:style-name="ce4"/>
          <table:table-cell office:value-type="date" office:date-value="2026-06-15T00:00:00" table:style-name="ce7">
            <text:p><text:a xlink:href="https://eu.spa.pxier.com/fr/spatrans.aspx?id=2485&amp;cid=8431">15/06/2026</text:a></text:p>
          </table:table-cell>
          <table:table-cell office:value-type="date" office:date-value="2026-06-20T00:00:00" table:style-name="ce7">
            <text:p><text:a xlink:href="https://eu.spa.pxier.com/fr/contract.aspx?id=5368&amp;cid=8431">20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Thais Hourbette</text:p>
          </table:table-cell>
          <table:table-cell office:value-type="string" table:style-name="ce6">
            <text:p>Paris, France</text:p>
          </table:table-cell>
          <table:table-cell office:value-type="float" office:value="689228752" table:style-name="ce6">
            <text:p>689228752</text:p>
          </table:table-cell>
          <table:table-cell table:number-columns-repeated="2" table:style-name="ce6"/>
          <table:table-cell table:style-name="ce4"/>
          <table:table-cell office:value-type="date" office:date-value="2026-06-02T00:00:00" table:style-name="ce7">
            <text:p><text:a xlink:href="https://eu.spa.pxier.com/fr/spatrans.aspx?id=2473&amp;cid=8354">02/06/2026</text:a></text:p>
          </table:table-cell>
          <table:table-cell office:value-type="date" office:date-value="2026-06-10T00:00:00" table:style-name="ce7">
            <text:p><text:a xlink:href="https://eu.spa.pxier.com/fr/contract.aspx?id=5260&amp;cid=8354">10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Sarah Line Attlan</text:p>
          </table:table-cell>
          <table:table-cell office:value-type="string" table:style-name="ce6">
            <text:p>Paris, France</text:p>
          </table:table-cell>
          <table:table-cell office:value-type="float" office:value="769301461" table:style-name="ce6">
            <text:p>769301461</text:p>
          </table:table-cell>
          <table:table-cell table:number-columns-repeated="2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7T00:00:00" table:style-name="ce7">
            <text:p><text:a xlink:href="https://eu.spa.pxier.com/fr/contract.aspx?id=5367&amp;cid=4380">17/06/2026</text:a></text:p>
          </table:table-cell>
          <table:table-cell table:number-columns-repeated="16375"/>
        </table:table-row>
        <table:table-row table:style-name="ro2"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Sarah Line Attlan</text:p>
          </table:table-cell>
          <table:table-cell office:value-type="string" table:number-columns-spanned="1" table:number-rows-spanned="2" table:style-name="ce9">
            <text:p>Paris, France</text:p>
          </table:table-cell>
          <table:table-cell office:value-type="float" office:value="769301461" table:number-columns-spanned="1" table:number-rows-spanned="2" table:style-name="ce9">
            <text:p>769301461</text:p>
          </table:table-cell>
          <table:table-cell table:number-columns-spanned="1" table:number-rows-spanned="2" table:style-name="ce9"/>
          <table:table-cell table:number-columns-spanned="1" table:number-rows-spanned="2" table:style-name="ce9"/>
          <table:table-cell table:number-columns-spanned="1" table:number-rows-spanned="2" table:style-name="ce10"/>
          <table:table-cell office:value-type="date" office:date-value="2025-03-05T00:00:00" table:number-columns-spanned="1" table:number-rows-spanned="2" table:style-name="ce11">
            <text:p><text:a xlink:href="https://eu.spa.pxier.com/fr/spatrans.aspx?id=15&amp;cid=4348">05/03/2025</text:a></text:p>
          </table:table-cell>
          <table:table-cell office:value-type="date" office:date-value="2026-06-12T00:00:00" table:style-name="ce7">
            <text:p><text:a xlink:href="https://eu.spa.pxier.com/fr/contract.aspx?id=5335&amp;cid=4348">12/06/2026</text:a>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6-06-05T00:00:00" table:style-name="ce7">
            <text:p><text:a xlink:href="https://eu.spa.pxier.com/fr/contract.aspx?id=5285&amp;cid=4348">05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Alexandra Monasson</text:p>
          </table:table-cell>
          <table:table-cell office:value-type="string" table:style-name="ce6">
            <text:p>Pouilly sur Loire, France</text:p>
          </table:table-cell>
          <table:table-cell office:value-type="float" office:value="785542792" table:style-name="ce6">
            <text:p>785542792</text:p>
          </table:table-cell>
          <table:table-cell table:number-columns-repeated="2" table:style-name="ce6"/>
          <table:table-cell table:style-name="ce4"/>
          <table:table-cell office:value-type="date" office:date-value="2026-06-05T00:00:00" table:style-name="ce7">
            <text:p><text:a xlink:href="https://eu.spa.pxier.com/fr/spatrans.aspx?id=2475&amp;cid=8368">05/06/2026</text:a></text:p>
          </table:table-cell>
          <table:table-cell office:value-type="date" office:date-value="2026-06-06T00:00:00" table:style-name="ce7">
            <text:p><text:a xlink:href="https://eu.spa.pxier.com/fr/contract.aspx?id=5278&amp;cid=8368">06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harlotte Bensa</text:p>
          </table:table-cell>
          <table:table-cell office:value-type="string" table:style-name="ce6">
            <text:p>Neuilly sur Seine, France</text:p>
          </table:table-cell>
          <table:table-cell office:value-type="float" office:value="3405233017" table:style-name="ce6">
            <text:p>3405233017</text:p>
          </table:table-cell>
          <table:table-cell table:style-name="ce6"/>
          <table:table-cell office:value-type="float" office:value="3405233017" table:style-name="ce6">
            <text:p>3405233017</text:p>
          </table:table-cell>
          <table:table-cell table:style-name="ce4"/>
          <table:table-cell office:value-type="date" office:date-value="2026-06-19T00:00:00" table:style-name="ce7">
            <text:p><text:a xlink:href="https://eu.spa.pxier.com/fr/spatrans.aspx?id=2491&amp;cid=8481">19/06/2026</text:a></text:p>
          </table:table-cell>
          <table:table-cell office:value-type="date" office:date-value="2026-06-20T00:00:00" table:style-name="ce7">
            <text:p><text:a xlink:href="https://eu.spa.pxier.com/fr/contract.aspx?id=5426&amp;cid=8481">20/06/2026</text:a>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6">
            <text:p>Carolina Pungiluppi</text:p>
          </table:table-cell>
          <table:table-cell office:value-type="string" table:style-name="ce6">
            <text:p>Genève, Switzerland</text:p>
          </table:table-cell>
          <table:table-cell office:value-type="float" office:value="41795476293" table:style-name="ce6">
            <text:p>41795476293</text:p>
          </table:table-cell>
          <table:table-cell table:number-columns-repeated="2" table:style-name="ce6"/>
          <table:table-cell table:style-name="ce4"/>
          <table:table-cell office:value-type="date" office:date-value="2026-06-12T00:00:00" table:style-name="ce7">
            <text:p><text:a xlink:href="https://eu.spa.pxier.com/fr/spatrans.aspx?id=2483&amp;cid=8412">12/06/2026</text:a></text:p>
          </table:table-cell>
          <table:table-cell office:value-type="date" office:date-value="2026-06-22T00:00:00" table:style-name="ce7">
            <text:p><text:a xlink:href="https://eu.spa.pxier.com/fr/contract.aspx?id=5378&amp;cid=8412">22/06/2026</text:a>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6">
            <text:p>Mr Rogerson</text:p>
          </table:table-cell>
          <table:table-cell office:value-type="string" table:style-name="ce6">
            <text:p>France</text:p>
          </table:table-cell>
          <table:table-cell office:value-type="float" office:value="447802236526" table:style-name="ce6">
            <text:p>4,47802E+11</text:p>
          </table:table-cell>
          <table:table-cell table:number-columns-repeated="2" table:style-name="ce6"/>
          <table:table-cell table:style-name="ce4"/>
          <table:table-cell office:value-type="string" table:style-name="ce4">
            <text:p>-</text:p>
          </table:table-cell>
          <table:table-cell office:value-type="date" office:date-value="2026-06-16T00:00:00" table:style-name="ce7">
            <text:p><text:a xlink:href="https://eu.spa.pxier.com/fr/contract.aspx?id=5370&amp;cid=8433">16/06/2026</text:a></text:p>
          </table:table-cell>
          <table:table-cell table:number-columns-repeated="16375"/>
        </table:table-row>
        <table:table-row table:number-rows-repeated="10484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m_sansregular" svg:font-family="Dm_sansregular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30026</meta:generator>
    <meta:initial-creator>Amboaraniaina RANDRIANARIMANANA</meta:initial-creator>
    <dc:creator>Amboaraniaina RANDRIANARIMANANA</dc:creator>
    <meta:creation-date>2026-06-30T17:06:25Z</meta:creation-date>
    <dc:date>2026-06-30T17:07:56Z</dc:date>
  </office:meta>
</office:document-meta>
</file>
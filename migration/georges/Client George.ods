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m_sansregular" svg:font-family="Dm_sansregula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7FBFF" style:repeat-content="false"/>
      <style:paragraph-properties fo:text-align="center"/>
      <style:text-properties fo:color="#A1A1A1" style:font-name="Dm_sansregular" style:font-name-asian="Dm_sansregular" style:font-name-complex="Dm_sansregular" fo:font-size="9pt" style:font-size-asian="9pt" style:font-size-complex="9pt"/>
    </style:style>
    <style:style style:name="ce3" style:family="table-cell" style:parent-style-name="Default" style:data-style-name="N0">
      <style:table-cell-properties style:vertical-align="middle" fo:wrap-option="wrap" fo:background-color="#F7FBFF" style:repeat-content="false"/>
      <style:paragraph-properties fo:text-align="start" fo:margin-left="0cm"/>
      <style:text-properties fo:color="#A1A1A1" style:font-name="Dm_sansregular" style:font-name-asian="Dm_sansregular" style:font-name-complex="Dm_sansregular" fo:font-size="9pt" style:font-size-asian="9pt" style:font-size-complex="9pt"/>
    </style:style>
    <style:style style:name="ce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666666" style:font-name="Dm_sansregular" style:font-name-asian="Dm_sansregular" style:font-name-complex="Dm_sansregular" fo:font-size="8pt" style:font-size-asian="8pt" style:font-size-complex="8pt"/>
    </style:style>
    <style:style style:name="ce5" style:family="table-cell" style:parent-style-name="Lien_32_hypertexte" style:data-style-name="N0">
      <style:table-cell-properties style:vertical-align="middle" fo:wrap-option="wrap" fo:background-color="#FFFFFF" style:repeat-content="false"/>
      <style:paragraph-properties fo:text-align="center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666666" style:font-name="Dm_sansregular" style:font-name-asian="Dm_sansregular" style:font-name-complex="Dm_sansregular" fo:font-size="8pt" style:font-size-asian="8pt" style:font-size-complex="8pt"/>
    </style:style>
    <style:style style:name="ce7" style:family="table-cell" style:parent-style-name="Lien_32_hypertexte" style:data-style-name="N19">
      <style:table-cell-properties style:vertical-align="middle" fo:wrap-option="wrap" fo:background-color="#FFFFFF" style:repeat-content="false"/>
      <style:paragraph-properties fo:text-align="center"/>
      <style:text-properties fo:color="#0563C1" style:text-underline-style="solid" style:text-underline-type="single"/>
    </style:style>
    <style:style style:name="ce8" style:family="table-cell" style:parent-style-name="Lien_32_hypertexte" style:data-style-name="N0">
      <style:table-cell-properties style:vertical-align="middle" fo:wrap-option="wrap" fo:background-color="#FFFFFF" style:repeat-content="false"/>
      <style:paragraph-properties fo:text-align="center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666666" style:font-name="Dm_sansregular" style:font-name-asian="Dm_sansregular" style:font-name-complex="Dm_sansregular" fo:font-size="8pt" style:font-size-asian="8pt" style:font-size-complex="8pt"/>
    </style:style>
    <style:style style:name="ce1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666666" style:font-name="Dm_sansregular" style:font-name-asian="Dm_sansregular" style:font-name-complex="Dm_sansregular" fo:font-size="8pt" style:font-size-asian="8pt" style:font-size-complex="8pt"/>
    </style:style>
    <style:style style:name="ce11" style:family="table-cell" style:parent-style-name="Lien_32_hypertexte" style:data-style-name="N19">
      <style:table-cell-properties style:vertical-align="middle" fo:wrap-option="wrap" fo:background-color="#FFFFFF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30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Modifier</text:p>
          </table:table-cell>
          <table:table-cell office:value-type="string" table:style-name="ce3">
            <text:p>client</text:p>
          </table:table-cell>
          <table:table-cell office:value-type="string" table:style-name="ce3">
            <text:p>Ville</text:p>
          </table:table-cell>
          <table:table-cell office:value-type="string" table:style-name="ce3">
            <text:p>Téléphone</text:p>
          </table:table-cell>
          <table:table-cell office:value-type="string" table:style-name="ce3">
            <text:p>Téléphone fixe#</text:p>
          </table:table-cell>
          <table:table-cell office:value-type="string" table:style-name="ce3">
            <text:p>Mobile#</text:p>
          </table:table-cell>
          <table:table-cell office:value-type="string" table:style-name="ce2">
            <text:p>PMS</text:p>
          </table:table-cell>
          <table:table-cell office:value-type="string" table:style-name="ce2">
            <text:p>Transactions</text:p>
          </table:table-cell>
          <table:table-cell office:value-type="string" table:style-name="ce2">
            <text:p>Rendez-vous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ALEXANDRE ROTH</text:p>
          </table:table-cell>
          <table:table-cell office:value-type="string" table:style-name="ce6">
            <text:p>STRASBOURG, France</text:p>
          </table:table-cell>
          <table:table-cell office:value-type="float" office:value="612693589" table:style-name="ce6">
            <text:p>612693589</text:p>
          </table:table-cell>
          <table:table-cell table:number-columns-repeated="2" table:style-name="ce6"/>
          <table:table-cell table:style-name="ce4"/>
          <table:table-cell office:value-type="date" office:date-value="2026-07-02T00:00:00" table:style-name="ce7">
            <text:p><text:a xlink:href="https://eu.spa.pxier.com/fr/spatrans.aspx?id=2498&amp;cid=8564">02/07/2026</text:a></text:p>
          </table:table-cell>
          <table:table-cell office:value-type="date" office:date-value="2026-07-07T00:00:00" table:style-name="ce7">
            <text:p><text:a xlink:href="https://eu.spa.pxier.com/fr/contract.aspx?id=5542&amp;cid=8564">07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Anne Doucet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74041047" table:style-name="ce6">
            <text:p>674041047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3T00:00:00" table:style-name="ce7">
            <text:p><text:a xlink:href="https://eu.spa.pxier.com/fr/contract.aspx?id=5506&amp;cid=8536">03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Anne Caroline Girard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76343580" table:style-name="ce6">
            <text:p>676343580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6T00:00:00" table:style-name="ce7">
            <text:p><text:a xlink:href="https://eu.spa.pxier.com/fr/contract.aspx?id=5320&amp;cid=8397">06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Arthur Garros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4T00:00:00" table:style-name="ce7">
            <text:p><text:a xlink:href="https://eu.spa.pxier.com/fr/contract.aspx?id=5530&amp;cid=8555">04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Aurelie Louis-Alexandre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1T00:00:00" table:style-name="ce7">
            <text:p><text:a xlink:href="https://eu.spa.pxier.com/fr/contract.aspx?id=5513&amp;cid=8539">01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bendita malakia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4T00:00:00" table:style-name="ce7">
            <text:p><text:a xlink:href="https://eu.spa.pxier.com/fr/contract.aspx?id=5173&amp;cid=8290">04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Calixte Bernard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33635163615" table:style-name="ce6">
            <text:p>33635163615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6T00:00:00" table:style-name="ce7">
            <text:p><text:a xlink:href="https://eu.spa.pxier.com/fr/contract.aspx?id=5552&amp;cid=8574">06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Camila Martinez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14980779" table:style-name="ce6">
            <text:p>614980779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16T00:00:00" table:style-name="ce7">
            <text:p><text:a xlink:href="https://eu.spa.pxier.com/fr/contract.aspx?id=5547&amp;cid=8569">16/07/2026</text:a>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string" table:style-name="ce6">
            <text:p>fondatrice Season Cathy Closier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4T00:00:00" table:style-name="ce7">
            <text:p><text:a xlink:href="https://eu.spa.pxier.com/fr/contract.aspx?id=5555&amp;cid=8577">04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Jessica Perran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10T00:00:00" table:style-name="ce7">
            <text:p><text:a xlink:href="https://eu.spa.pxier.com/fr/contract.aspx?id=4126&amp;cid=7535">10/07/2026</text:a></text:p>
          </table:table-cell>
          <table:table-cell table:number-columns-repeated="16375"/>
        </table:table-row>
        <table:table-row table:style-name="ro3">
          <table:table-cell table:number-columns-spanned="1" table:number-rows-spanned="3" table:style-name="ce8"/>
          <table:table-cell office:value-type="string" table:number-columns-spanned="1" table:number-rows-spanned="3" table:style-name="ce9">
            <text:p>Journaliste ok</text:p>
          </table:table-cell>
          <table:table-cell office:value-type="string" table:number-columns-spanned="1" table:number-rows-spanned="3" table:style-name="ce9">
            <text:p>France</text:p>
          </table:table-cell>
          <table:table-cell table:number-columns-spanned="1" table:number-rows-spanned="3" table:style-name="ce9"/>
          <table:table-cell table:number-columns-spanned="1" table:number-rows-spanned="3" table:style-name="ce9"/>
          <table:table-cell table:number-columns-spanned="1" table:number-rows-spanned="3" table:style-name="ce9"/>
          <table:table-cell table:number-columns-spanned="1" table:number-rows-spanned="3" table:style-name="ce10"/>
          <table:table-cell office:value-type="string" table:number-columns-spanned="1" table:number-rows-spanned="3" table:style-name="ce10">
            <text:p>-</text:p>
          </table:table-cell>
          <table:table-cell office:value-type="date" office:date-value="2026-07-08T00:00:00" table:style-name="ce7">
            <text:p><text:a xlink:href="https://eu.spa.pxier.com/fr/contract.aspx?id=5492&amp;cid=8525">08/07/2026</text:a>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7-08T00:00:00" table:style-name="ce7">
            <text:p><text:a xlink:href="https://eu.spa.pxier.com/fr/contract.aspx?id=5491&amp;cid=8525">08/07/2026</text:a>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7-01T00:00:00" table:style-name="ce7">
            <text:p><text:a xlink:href="https://eu.spa.pxier.com/fr/contract.aspx?id=5490&amp;cid=8525">01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journaliste ELLE Pauline Jacmart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4T00:00:00" table:style-name="ce7">
            <text:p><text:a xlink:href="https://eu.spa.pxier.com/fr/contract.aspx?id=5554&amp;cid=8576">04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Laura Maman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4T00:00:00" table:style-name="ce7">
            <text:p><text:a xlink:href="https://eu.spa.pxier.com/fr/contract.aspx?id=5559&amp;cid=8579">04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Léa Marot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35396720" table:style-name="ce6">
            <text:p>635396720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19T00:00:00" table:style-name="ce7">
            <text:p><text:a xlink:href="https://eu.spa.pxier.com/fr/contract.aspx?id=5568&amp;cid=8585">19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Lina Alsaadoon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2T00:00:00" table:style-name="ce7">
            <text:p><text:a xlink:href="https://eu.spa.pxier.com/fr/contract.aspx?id=5523&amp;cid=8549">02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Marie Marinelli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37212588" table:style-name="ce6">
            <text:p>637212588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11T00:00:00" table:style-name="ce7">
            <text:p><text:a xlink:href="https://eu.spa.pxier.com/fr/contract.aspx?id=5578&amp;cid=8590">11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Michelle Orsin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27837082044" table:style-name="ce6">
            <text:p>27837082044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4T00:00:00" table:style-name="ce7">
            <text:p><text:a xlink:href="https://eu.spa.pxier.com/fr/contract.aspx?id=5561&amp;cid=8580">04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Mila Owen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447748464753" table:style-name="ce6">
            <text:p>4,47748E+11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2T00:00:00" table:style-name="ce7">
            <text:p><text:a xlink:href="https://eu.spa.pxier.com/fr/contract.aspx?id=5537&amp;cid=8561">02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Mr. Alagel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966578000000" table:style-name="ce6">
            <text:p>9,66578E+11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3T00:00:00" table:style-name="ce7">
            <text:p><text:a xlink:href="https://eu.spa.pxier.com/fr/contract.aspx?id=5551&amp;cid=8573">03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Natalie Diaz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5T00:00:00" table:style-name="ce7">
            <text:p><text:a xlink:href="https://eu.spa.pxier.com/fr/contract.aspx?id=5564&amp;cid=8582">05/07/2026</text:a></text:p>
          </table:table-cell>
          <table:table-cell table:number-columns-repeated="16375"/>
        </table:table-row>
        <table:table-row table:style-name="ro3">
          <table:table-cell table:number-columns-spanned="1" table:number-rows-spanned="3" table:style-name="ce8"/>
          <table:table-cell office:value-type="string" table:number-columns-spanned="1" table:number-rows-spanned="3" table:style-name="ce9">
            <text:p>Philippine Maurizi</text:p>
          </table:table-cell>
          <table:table-cell office:value-type="string" table:number-columns-spanned="1" table:number-rows-spanned="3" table:style-name="ce9">
            <text:p>Paris, France</text:p>
          </table:table-cell>
          <table:table-cell office:value-type="float" office:value="632330975" table:number-columns-spanned="1" table:number-rows-spanned="3" table:style-name="ce9">
            <text:p>632330975</text:p>
          </table:table-cell>
          <table:table-cell table:number-columns-spanned="1" table:number-rows-spanned="3" table:style-name="ce9"/>
          <table:table-cell table:number-columns-spanned="1" table:number-rows-spanned="3" table:style-name="ce9"/>
          <table:table-cell table:number-columns-spanned="1" table:number-rows-spanned="3" table:style-name="ce10"/>
          <table:table-cell office:value-type="date" office:date-value="2026-06-30T00:00:00" table:style-name="ce7">
            <text:p><text:a xlink:href="https://eu.spa.pxier.com/fr/spatrans.aspx?id=2497&amp;cid=3551">30/06/2026</text:a></text:p>
          </table:table-cell>
          <table:table-cell office:value-type="date" office:date-value="2026-07-01T00:00:00" table:number-columns-spanned="1" table:number-rows-spanned="3" table:style-name="ce11">
            <text:p><text:a xlink:href="https://eu.spa.pxier.com/fr/contract.aspx?id=5519&amp;cid=3551">01/07/2026</text:a>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6-11T00:00:00" table:style-name="ce7">
            <text:p><text:a xlink:href="https://eu.spa.pxier.com/fr/spatrans.aspx?id=2480&amp;cid=3551">11/06/2026</text:a></text:p>
          </table:table-cell>
          <table:covered-table-cell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3-19T00:00:00" table:style-name="ce7">
            <text:p><text:a xlink:href="https://eu.spa.pxier.com/fr/spatrans.aspx?id=2173&amp;cid=3551">19/03/2026</text:a></text:p>
          </table:table-cell>
          <table:covered-table-cell/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Reed Laurent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14404135886" table:style-name="ce6">
            <text:p>14404135886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6T00:00:00" table:style-name="ce7">
            <text:p><text:a xlink:href="https://eu.spa.pxier.com/fr/contract.aspx?id=5570&amp;cid=8587">06/07/2026</text:a></text:p>
          </table:table-cell>
          <table:table-cell table:number-columns-repeated="16375"/>
        </table:table-row>
        <table:table-row table:style-name="ro3">
          <table:table-cell table:number-columns-spanned="1" table:number-rows-spanned="3" table:style-name="ce8"/>
          <table:table-cell office:value-type="string" table:number-columns-spanned="1" table:number-rows-spanned="3" table:style-name="ce9">
            <text:p>Sarah Line Attlan</text:p>
          </table:table-cell>
          <table:table-cell office:value-type="string" table:number-columns-spanned="1" table:number-rows-spanned="3" table:style-name="ce9">
            <text:p>France</text:p>
          </table:table-cell>
          <table:table-cell table:number-columns-spanned="1" table:number-rows-spanned="3" table:style-name="ce9"/>
          <table:table-cell table:number-columns-spanned="1" table:number-rows-spanned="3" table:style-name="ce9"/>
          <table:table-cell table:number-columns-spanned="1" table:number-rows-spanned="3" table:style-name="ce9"/>
          <table:table-cell table:number-columns-spanned="1" table:number-rows-spanned="3" table:style-name="ce10"/>
          <table:table-cell office:value-type="string" table:number-columns-spanned="1" table:number-rows-spanned="3" table:style-name="ce10">
            <text:p>-</text:p>
          </table:table-cell>
          <table:table-cell office:value-type="date" office:date-value="2026-07-12T00:00:00" table:style-name="ce7">
            <text:p><text:a xlink:href="https://eu.spa.pxier.com/fr/contract.aspx?id=5510&amp;cid=6150">12/07/2026</text:a>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7-11T00:00:00" table:style-name="ce7">
            <text:p><text:a xlink:href="https://eu.spa.pxier.com/fr/contract.aspx?id=5509&amp;cid=6150">11/07/2026</text:a>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7-08T00:00:00" table:style-name="ce7">
            <text:p><text:a xlink:href="https://eu.spa.pxier.com/fr/contract.aspx?id=5482&amp;cid=6150">08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Tess Carter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16463019872" table:style-name="ce6">
            <text:p>16463019872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6T00:00:00" table:style-name="ce7">
            <text:p><text:a xlink:href="https://eu.spa.pxier.com/fr/contract.aspx?id=5572&amp;cid=8589">06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Tiffany Buathier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33762119060" table:style-name="ce6">
            <text:p>33762119060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30T00:00:00" table:style-name="ce7">
            <text:p><text:a xlink:href="https://eu.spa.pxier.com/fr/contract.aspx?id=5574&amp;cid=8591">30/07/2026</text:a></text:p>
          </table:table-cell>
          <table:table-cell table:number-columns-repeated="16375"/>
        </table:table-row>
        <table:table-row table:number-rows-repeated="104854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m_sansregular" svg:font-family="Dm_sansregular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30131</meta:generator>
    <meta:initial-creator>Amboaraniaina RANDRIANARIMANANA</meta:initial-creator>
    <dc:creator>Amboaraniaina RANDRIANARIMANANA</dc:creator>
    <meta:creation-date>2026-07-06T16:58:27Z</meta:creation-date>
    <dc:date>2026-07-06T16:58:55Z</dc:date>
  </office:meta>
</office:document-meta>
</file>